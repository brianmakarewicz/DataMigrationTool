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4000000246B59DFB9C.png" manifest:media-type="image/png"/>
  <manifest:file-entry manifest:full-path="Pictures/10000001000006F800000206E1045D8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4.8437in" draw:z-index="1"><draw:image xlink:href="Pictures/100000010000034000000246B59DFB9C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2" text:anchor-type="char" svg:width="6.9252in" svg:height="2.0102in" draw:z-index="0"><draw:image xlink:href="Pictures/10000001000006F800000206E1045D82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0:37:53.085652700</meta:creation-date>
    <dc:date>2026-05-05T11:11:02.900586100</dc:date>
    <meta:editing-duration>PT33M11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6.2.2.2$Windows_X86_64 LibreOffice_project/1f77d10d6938fd34972958f64b2bcfa54f8b1ba5</meta:generator>
  </office:meta>
</office:document-meta>
</file>